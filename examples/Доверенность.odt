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1cm" style:auto-text-indent="false" style:writing-mode="lr-tb">
        <style:tab-stops>
          <style:tab-stop style:position="0.99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 fo:background-color="#ffff00"/>
    </style:style>
    <style:style style:name="P9" style:family="paragraph" style:parent-style-name="Текст_20_в_20_заданном_20_формате">
      <style:paragraph-properties fo:margin-top="0cm" fo:margin-bottom="0cm" style:contextual-spacing="true" fo:text-align="center" style:justify-single-word="false"/>
    </style:style>
    <style:style style:name="P10" style:family="paragraph" style:parent-style-name="Текст_20_в_20_заданном_20_формате">
      <style:paragraph-properties fo:margin-top="0cm" fo:margin-bottom="0cm" style:contextual-spacing="tru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Текст_20_в_20_заданном_20_формате">
      <style:paragraph-properties fo:margin-top="0cm" fo:margin-bottom="0cm" style:contextual-spacing="tru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Текст_20_в_20_заданном_20_формате">
      <style:paragraph-properties fo:margin-top="0cm" fo:margin-bottom="0cm" style:contextual-spacing="true" fo:text-align="end" style:justify-single-word="false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 fo:background-color="#ffff00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fo:background-color="#ffff00"/>
    </style:style>
    <style:style style:name="T6" style:family="text">
      <style:text-properties fo:background-color="#ffff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ДОВЕРЕННОСТЬ № </text:span><text:span text:style-name="T2">Доверенность.Номер</text:span><text:span text:style-name="T3"/></text:p>
      <text:p text:style-name="P10"/>
      <text:p text:style-name="P12"><text:span text:style-name="T5">Доверенность.Дата_Совершения.Числовой</text:span><text:span text:style-name="T4"/></text:p>
      <text:p text:style-name="P11"/>
      <text:p text:style-name="P1"><text:span text:style-name="T6">Доверитель.Фирменное_Наименование.Полное.Именительный</text:span> (далее — <text:span text:style-name="T7">«Общество»)</text:span> в лице <text:span text:style-name="T6">Доверитель.Руководитель.Должность.Родительный</text:span> <text:span text:style-name="T6">Доверитель.Руководитель.ФИО.Сокращенные.Родительный</text:span>, действующего на основании <text:span text:style-name="T6">Доверитель.Руководитель.Основание_Полномочий.Родительный</text:span>, настоящей доверенностью уполномочивает</text:p>
      <text:p text:style-name="P2"><text:span text:style-name="T6">Представитель.ФИО.Полные.Винительный </text:span>(<text:span text:style-name="T6">Представитель.Документ_Удостоверяющий_Личность.Наименование.Именительный</text:span> <text:span text:style-name="T6">Представитель.Документ_Удостоверяющий_Личность.Идентификационные_Данные</text:span>, дата выдачи <text:span text:style-name="T6">Представитель.Документ_Удостоверяющий_Личность.Выдача.Дата.Числовой</text:span>):</text:p>
      <text:p text:style-name="P3"/>
      <text:p text:style-name="P4">1.<text:span text:style-name="T8"> </text:span>Быть представителем Общества по любым вопросам перед любыми физическими лицами (включая индивидуальных предпринимателей и иных лиц, осуществляющих предпринимательскую деятельность), перед любыми юридическими лицами (в любых организациях), в любых органах, в том числе:</text:p>
      <text:p text:style-name="P4">– в арбитражных судах;</text:p>
      <text:p text:style-name="P4">– в судах общей юрисдикции (в том числе у мировых судей);</text:p>
      <text:p text:style-name="P4">– в третейских судах;</text:p>
      <text:p text:style-name="P4">– в Федеральной службе судебных приставов;</text:p>
      <text:p text:style-name="P4">– в любых организациях связи, в том числе в АО «Почта России»;</text:p>
      <text:p text:style-name="P4">– в Федеральной налоговой службе;</text:p>
      <text:p text:style-name="P4">– в Федеральной антимонопольной службе;</text:p>
      <text:p text:style-name="P4">– в мультифункциональных центрах предоставления государственных и муниципальных услуг;</text:p>
      <text:p text:style-name="P4">– в Федеральной службе государственной регистрации, кадастра и картографии (Росреестр);</text:p>
      <text:p text:style-name="P4">– в Федеральной службе государственной статистики;</text:p>
      <text:p text:style-name="P4">– в Федеральной службе по труду и занятности (Роструд) и государственных инспекциях труда;</text:p>
      <text:p text:style-name="P4">– в Федеральной службе по надзору в сфере защиты прав потребителей и благополучия человека (Роспотребнадзор);</text:p>
      <text:p text:style-name="P4">– в Федеральной службе по надзору в сфере связи, информационных технологий и массовых коммуникаций (Роскомнадзор);</text:p>
      <text:p text:style-name="P4">– в Федеральной службе по интеллектуальной собственности (Роспатент);</text:p>
      <text:p text:style-name="P4">– в Федеральном государственном бюджетном учреждении «Федеральный институт промышленной собственности» (ФГБУ ФИПС);</text:p>
      <text:p text:style-name="P4">– в Банке России;</text:p>
      <text:p text:style-name="P4">– в Социальном фонде Российской Федерации;</text:p>
      <text:p text:style-name="P4">– в фондах обязательного медицинского страхования;</text:p>
      <text:p text:style-name="P4">– в органах внутренних дел, в том числе в полиции и Следственном комитете Российской Федерации;</text:p>
      <text:p text:style-name="P4">– в прокуратуре Российской Федерации;</text:p>
      <text:p text:style-name="P4">– в Государственной инспекции безопасности дорожного движения Министерства внутренних дел Российской Федерации (Госавтоинспекция);</text:p>
      <text:p text:style-name="P4">– в Департаменте образования и науки г. Москвы;</text:p>
      <text:p text:style-name="P4">– в банках и иных кредитных организациях;</text:p>
      <text:p text:style-name="P4">– у страховщиков (в страховых организациях, страховых компаниях);</text:p>
      <text:p text:style-name="P4">– перед нотариусами и в нотариальных конторах (в том числе по любым вопросам, связанным с обеспечением доказательств);</text:p>
      <text:p text:style-name="P4"><text:soft-page-break/>– в любых организациях и перед любыми гражданами, осуществляющими функции по проведению экспертных исследований;</text:p>
      <text:p text:style-name="P4">– в любых организациях и перед любыми физическими лицами, осуществляющими оценочную деятельность.</text:p>
      <text:p text:style-name="P4">При этом представитель вправе представлять Общество в том числе в любых структурных, территориальных и обособленных подразделениях (органах, управлениях, отделах, отделениях, филиалах, представительствах, инспекциях и т. д.) соответствующих органов и организаций.</text:p>
      <text:p text:style-name="P3"/>
      <text:p text:style-name="P4">2. От лица Общества:</text:p>
      <text:p text:style-name="P4">1) Осуществлять все полномочия, предоставленные законом истцу, ответчику, административному истцу, административному ответчику, третьему лицу, иным участникам судебного процесса, в том числе:</text:p>
      <text:p text:style-name="P4">– подписывать и представлять в суд исковые заявления (предъявлять иски);</text:p>
      <text:p text:style-name="P4">– подписывать и представлять в суд административные исковые заявления (предъявлять административные иски);</text:p>
      <text:p text:style-name="P4">– подписывать и представлять в суд встречные исковые заявления (предъявлять встречные иски);</text:p>
      <text:p text:style-name="P4">– подписывать и представлять в суд встречные административные исковые заявления (предъявлять встречные административные иски);</text:p>
      <text:p text:style-name="P4">– подписывать и представлять в суд заявления о вынесении судебного приказа;</text:p>
      <text:p text:style-name="P4">– подписывать и подавать в суд заявления об обеспечении исков;</text:p>
      <text:p text:style-name="P4">– подписывать и представлять в суд заявления о применении мер предварительной защиты по административному иску;</text:p>
      <text:p text:style-name="P4">– подписывать и представлять в суд отзывы (возражения) на исковые заявления (иски);</text:p>
      <text:p text:style-name="P4">– подписывать и представлять в суд отзывы (возражения) на административные исковые заявления (административные иски);</text:p>
      <text:p text:style-name="P4">– отказываться от исковых требований (от исков) как полностью, так и частично;</text:p>
      <text:p text:style-name="P5">– отказываться от административных исковых требований (от административных исков) как полностью, так и частично;</text:p>
      <text:p text:style-name="P4">– признавать иски;</text:p>
      <text:p text:style-name="P4">– признавать административные иски;</text:p>
      <text:p text:style-name="P4">– изменять предмет и основание исков;</text:p>
      <text:p text:style-name="P4">– изменять предмет и основание административных исков;</text:p>
      <text:p text:style-name="P4">– уменьшать размер исковых требований;</text:p>
      <text:p text:style-name="P4">– заключать мировые соглашения и соглашения по фактическим обстоятельствам;</text:p>
      <text:p text:style-name="P4">– заключать соглашения о примирении сторон и соглашения по фактическим обстоятельствам административного дела;</text:p>
      <text:p text:style-name="P4">– обжаловать судебные постановления и судебные акты, в том числе подписывать и представлять в суд соответствующие жалобы и заявления;</text:p>
      <text:p text:style-name="P4">– подписывать и представлять в суд заявления о пересмотре судебных постановлений и судебных актов по новым и вновь открывшимся обстоятельствам;</text:p>
      <text:p text:style-name="P4">– подписывать и представлять в суд любые иные заявления и ходатайства.</text:p>
      <text:p text:style-name="P4">– знакомиться с материалами дела, запрашивать и получать экземпляры (копии) материалов дела, запрашивать и получать экземпляры (копии) судебных постановлений и судебных актов.</text:p>
      <text:p text:style-name="P6">2) Осуществлять все полномочия, предоставленные законом должнику, взыскателю и иным участникам исполнительного производства, в том числе предъявлять исполнительные документы к исполнению, представлять (направлять) исполнительные документы в кредитные организации для исполнения ими содержащихся в исполнительных документах требований, подписывать и представлять в кредитные организации заявления, отзывать <text:soft-page-break/>исполнительные документы, обжаловать постановления и действия (бездействие) судебного пристава-исполнителя, отказываться от взыскания по исполнительным документам.</text:p>
      <text:p text:style-name="P6">3) Осуществлять все полномочия, предоставленные законом лицу, в отношении которого или в связи с действиями или бездействием которого подлежит составлению протокол об административном правонарушении или протокол осмотра места совершения административного правонарушения, лицу, в отношении которого ведется производство об административном правонарушении (защитнику такого лица), потерпевшему (представителю потерпевшего).</text:p>
      <text:p text:style-name="P6">4) Осуществлять все полномочия, предоставленные законом лицу, обжалующему акты налоговых органов ненормативного характера, действия или бездействие их должностных лиц.</text:p>
      <text:p text:style-name="P6">5) Осуществлять все полномочия, предоставленные законом лицу, участвующему в деле о нарушении антимонопольного законодательства или законодательства о рекламе.</text:p>
      <text:p text:style-name="P6">6) Совершать любые действия, направленные на защиту прав и законных интересов Общества, в том числе:</text:p>
      <text:p text:style-name="P4">– подписывать, направлять (представлять, подавать, предъявлять, предоставлять) и получать любые документы, в том числе заявления, требования, заявки, запросы, справки;</text:p>
      <text:p text:style-name="P4">– расписываться в получении любых документов;</text:p>
      <text:p text:style-name="P4">– подписывать, направлять и получать любые юридические значимые сообщения;</text:p>
      <text:p text:style-name="P4">– направлять и получать любые почтовые отправления, направлять и получать любую корреспонденцию, расписываться в их получении;</text:p>
      <text:p text:style-name="P4">– подписывать, направлять и получать досудебные претензии, вести претензионную работу;</text:p>
      <text:p text:style-name="P4">– заключать соглашения о досудебном урегулировании споров;</text:p>
      <text:p text:style-name="P4">– заверять копии хранимых Обществом документов;</text:p>
      <text:p text:style-name="P4">– вести переписку и переговоры;</text:p>
      <text:p text:style-name="P4">– давать любые устные и письменные пояснения (объяснения);</text:p>
      <text:p text:style-name="P4">– оплачивать любые пошлины и сборы.</text:p>
      <text:p text:style-name="P4">7) Заключать гражданско-правовые сделки, направленные на защиту прав и законных интересов Общества, в том числе договоры, предметом которых является оказание нотариальных услуг (в том числе услуг технического характера), проведение экспертных исследований, проведение оценки, перевозка документов и иных грузов, а также оплачивать товары, работы и услуги по таким сделкам, принимать исполнение по таким сделкам и подписывать связанные с их исполнением документы (в том числе акты, накладные и т. д.).</text:p>
      <text:p text:style-name="P4">Указанное в настоящем подпункте полномочие предоставлено в отношении сделок, цена товаров, работ и услуг по каждой из которых не превышает <text:span text:style-name="T6">Доверенность.Лимит_Расходов.Цифрами</text:span> (<text:span text:style-name="T6">Доверенность.Лимит_Расходов.Прописью</text:span>) рублей.</text:p>
      <text:p text:style-name="P4">8) Совершать иные юридические и фактические действия, связанные с предоставленными настоящей доверенностью полномочиями.</text:p>
      <text:p text:style-name="P4"/>
      <text:p text:style-name="P4">Доверенность выдана <text:span text:style-name="T6">Доверенность.Передоверие</text:span>.</text:p>
      <text:p text:style-name="P4">Срок действия доверенности: <text:span text:style-name="T6">Доверенность.Срок_Действия</text:span><text:span text:style-name="T9">.</text:span></text:p>
      <text:p text:style-name="P3"/>
      <text:p text:style-name="P3"/>
      <text:p text:style-name="P7"><text:span text:style-name="T11">Доверитель.Фирменное_Наименование.Сокращенное.Именительный</text:span><text:span text:style-name="T10"/></text:p>
      <text:p text:style-name="P7"><text:span text:style-name="T11">Доверитель.Руководитель.Должность.Именительный</text:span><text:span text:style-name="T10"/></text:p>
      <text:p text:style-name="P8"/>
      <text:p text:style-name="P7"><text:span text:style-name="T10">____________ / </text:span><text:span text:style-name="T11">Доверитель.Руководитель.ФИО.Сокращенные.Именительный</text:span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swiss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swiss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swiss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swiss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Standard" style:next-style-name="Standard" loext:linked-style-name="Название_20_объекта_20_Знак">
      <style:paragraph-properties fo:line-height="115%"/>
      <style:text-properties fo:color="#4472c4" loext:opacity="100%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 style:next-style-name="Standard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left="0cm" fo:margin-right="0cm" fo:line-height="0.445cm" fo:text-align="center" style:justify-single-word="false" fo:orphans="0" fo:widows="0" fo:text-indent="-0.564cm" style:auto-text-indent="false" fo:background-color="#ffffff"/>
      <style:text-properties fo:font-size="10.5pt" fo:font-weight="bold" style:font-size-asian="10.5pt" style:language-asian="en" style:country-asian="US" style:font-weight-asian="bold" style:font-size-complex="10.5pt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orphans="0" fo:widows="0" fo:hyphenation-ladder-count="no-limit"/>
      <style:text-properties style:font-name="Liberation Mono" fo:font-family="'Liberation Mono'" style:font-family-generic="swiss" fo:font-size="10pt" style:font-name-asian="NSimSun" style:font-family-asian="NSimSun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Arial" fo:font-family="Arial" style:font-family-generic="swiss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Arial" fo:font-family="Arial" style:font-family-generic="swiss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Arial" fo:font-family="Arial" style:font-family-generic="swiss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Arial" fo:font-family="Arial" style:font-family-generic="swiss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style:font-name="Arial" fo:font-family="Arial" style:font-family-generic="swiss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style:font-name="Arial" fo:font-family="Arial" style:font-family-generic="swiss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Arial" fo:font-family="Arial" style:font-family-generic="swiss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style:font-name="Arial" fo:font-family="Arial" style:font-family-generic="swiss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Arial" fo:font-family="Arial" style:font-family-generic="swiss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 loext:linked-style-name="Title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Footer_20_Char" style:display-name="Footer Char" style:family="text" style:parent-style-name="Default_20_Paragraph_20_Font"/>
    <style:style style:name="Название_20_объекта_20_Знак" style:display-name="Название объекта Знак" style:family="text" loext:linked-style-name="caption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 loext:linked-style-name="Footnote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loext:linked-style-name="Endnote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swiss" fo:font-size="10.5pt" fo:font-weight="bold" fo:background-color="#ffffff" style:font-name-asian="Times New Roman1" style:font-family-asian="'Times New Roman'" style:font-family-generic-asian="system" style:font-pitch-asian="variable" style:font-size-asian="10.5pt" style:font-weight-asian="bold" style:font-name-complex="Times New Roman1" style:font-family-complex="'Times New Roman'" style:font-family-generic-complex="system" style:font-pitch-complex="variable" style:font-size-complex="10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3:44:00</meta:creation-date>
    <meta:initial-creator>I B</meta:initial-creator>
    <dc:language>en-US</dc:language>
    <dc:date>2026-05-17T21:37:58</dc:date>
    <meta:editing-cycles>69</meta:editing-cycles>
    <meta:editing-duration>PT1H1M</meta:editing-duration>
    <meta:generator>LibreOffice/7.4.7.2$Linux_X86_64 LibreOffice_project/40$Build-2</meta:generator>
    <meta:document-statistic meta:table-count="0" meta:image-count="0" meta:object-count="0" meta:page-count="3" meta:paragraph-count="80" meta:word-count="923" meta:character-count="8407" meta:non-whitespace-character-count="7504"/>
    <meta:user-defined meta:name="AppVersion">15.0000</meta:user-defined>
  </office:meta>
</office:document-meta>
</file>